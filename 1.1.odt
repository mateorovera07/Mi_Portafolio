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0621B2BDB11.png" manifest:media-type="image/png"/>
  <manifest:file-entry manifest:full-path="Pictures/10000001000007800000016236D16961.png" manifest:media-type="image/png"/>
  <manifest:file-entry manifest:full-path="Pictures/10000001000007710000005BBEA1AD9C.png" manifest:media-type="image/png"/>
  <manifest:file-entry manifest:full-path="Pictures/10000001000007650000022E4A15B1F1.png" manifest:media-type="image/png"/>
  <manifest:file-entry manifest:full-path="Pictures/10000001000007660000022CB4C13723.png" manifest:media-type="image/png"/>
  <manifest:file-entry manifest:full-path="Pictures/100000010000076700000163518FED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fae" officeooo:paragraph-rsid="001f5fae"/>
    </style:style>
    <style:style style:name="P2" style:family="paragraph" style:parent-style-name="Standard">
      <style:text-properties officeooo:rsid="0020c63a" officeooo:paragraph-rsid="0020c63a"/>
    </style:style>
    <style:style style:name="P3" style:family="paragraph" style:parent-style-name="Standard">
      <style:text-properties fo:font-weight="normal" officeooo:rsid="0020c63a" officeooo:paragraph-rsid="0020c63a" style:font-weight-asian="normal" style:font-weight-complex="normal"/>
    </style:style>
    <style:style style:name="P4" style:family="paragraph" style:parent-style-name="Standard">
      <style:text-properties fo:font-weight="normal" officeooo:rsid="0022406c" officeooo:paragraph-rsid="002240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.0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0.838cm" draw:z-index="0"><draw:image xlink:href="Pictures/100000010000076F000000621B2BDB11.png" xlink:type="simple" xlink:show="embed" xlink:actuate="onLoad" draw:mime-type="image/png"/></draw:frame>Aquí se aprecia el <text:span text:style-name="T1">header</text:span> porque podemos ver el logo de Mercado Libre, título del sitio,índice con las distintas categorías y el Log In/Sign Up.</text:p>
      <text:p text:style-name="P1"/>
      <text:p text:style-name="P2"><draw:frame draw:style-name="fr2" draw:name="Imagen2" text:anchor-type="char" svg:width="17cm" svg:height="3.14cm" draw:z-index="1"><draw:image xlink:href="Pictures/10000001000007800000016236D16961.png" xlink:type="simple" xlink:show="embed" xlink:actuate="onLoad" draw:mime-type="image/png"/></draw:frame>En esta captura podemos observar imagenes que funcionan como botones ubicada dentro de <text:span text:style-name="T1">section</text:span><text:span text:style-name="T2">, que a su vez está dentro del </text:span><text:span text:style-name="T1">Main</text:span><draw:frame draw:style-name="fr2" draw:name="Imagen3" text:anchor-type="char" svg:width="17cm" svg:height="5.015cm" draw:z-index="2"><draw:image xlink:href="Pictures/10000001000007650000022E4A15B1F1.png" xlink:type="simple" xlink:show="embed" xlink:actuate="onLoad" draw:mime-type="image/png"/></draw:frame><text:span text:style-name="T2">.</text:span></text:p>
      <text:p text:style-name="P3"/>
      <text:p text:style-name="P3"><draw:frame draw:style-name="fr2" draw:name="Imagen4" text:anchor-type="char" svg:width="17cm" svg:height="4.988cm" draw:z-index="3"><draw:image xlink:href="Pictures/10000001000007660000022CB4C13723.png" xlink:type="simple" xlink:show="embed" xlink:actuate="onLoad" draw:mime-type="image/png"/></draw:frame>En esta otra captura observamos nuevamente otro <text:span text:style-name="T1">section</text:span>, que se distingue del anterior gracias al distinto color. También está dentro del <text:span text:style-name="T1">Main</text:span>.</text:p>
      <text:p text:style-name="P4"><draw:frame draw:style-name="fr3" draw:name="Imagen5" text:anchor-type="char" svg:x="0cm" svg:y="0cm" svg:width="17cm" svg:height="3.182cm" draw:z-index="4"><draw:image xlink:href="Pictures/100000010000076700000163518FEDFE.png" xlink:type="simple" xlink:show="embed" xlink:actuate="onLoad" draw:mime-type="image/png"/></draw:frame>Podemos analizar en esta foto que nos encontramos con un <text:span text:style-name="T1">nav</text:span>, ya que en el podemos navegar y buscar productos.</text:p>
      <text:p text:style-name="P4"><draw:frame draw:style-name="fr2" draw:name="Imagen6" text:anchor-type="char" svg:width="17cm" svg:height="0.808cm" draw:z-index="5"><draw:image xlink:href="Pictures/10000001000007710000005BBEA1AD9C.png" xlink:type="simple" xlink:show="embed" xlink:actuate="onLoad" draw:mime-type="image/png"/></draw:frame>Y por último tenemos el <text:span text:style-name="T1">footer</text:span>, dónde vemos el teléfono de contacto, copyright y otros apartados de ayu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09:33:16.323359900</meta:creation-date>
    <dc:date>2026-03-11T10:02:34.216372600</dc:date>
    <meta:editing-duration>PT7M</meta:editing-duration>
    <meta:editing-cycles>1</meta:editing-cycles>
    <meta:document-statistic meta:table-count="0" meta:image-count="6" meta:object-count="0" meta:page-count="1" meta:paragraph-count="5" meta:word-count="107" meta:character-count="633" meta:non-whitespace-character-count="531"/>
    <meta:generator>LibreOffice/25.2.0.3$Windows_X86_64 LibreOffice_project/e1cf4a87eb02d755bce1a01209907ea5ddc8f069</meta:generator>
  </office:meta>
</office:document-meta>
</file>